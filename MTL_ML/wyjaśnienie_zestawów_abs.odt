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1cc" officeooo:paragraph-rsid="001a41cc"/>
    </style:style>
    <style:style style:name="P2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bold" officeooo:paragraph-rsid="001a41cc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text-properties fo:color="#000000" loext:opacity="100%" style:font-name="Liberation Serif" fo:font-weight="normal" officeooo:paragraph-rsid="003409c5" style:font-size-asian="12pt" style:font-weight-asian="normal" style:font-weight-complex="normal"/>
    </style:style>
    <style:style style:name="P4" style:family="paragraph" style:parent-style-name="Text_20_body">
      <style:text-properties fo:color="#000000" loext:opacity="100%" style:font-name="Liberation Serif" fo:font-weight="normal" officeooo:paragraph-rsid="002d0a86" style:font-size-asian="12pt" style:font-weight-asian="normal" style:font-weight-complex="normal"/>
    </style:style>
    <style:style style:name="P5" style:family="paragraph" style:parent-style-name="Heading_20_3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color="#000000" loext:opacity="100%" style:font-name="Liberation Serif" fo:font-weight="normal" style:font-size-asian="12p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ac9c5"/>
    </style:style>
    <style:style style:name="P9" style:family="paragraph" style:parent-style-name="Heading_20_3">
      <style:text-properties style:font-name="Liberation Serif" fo:font-size="12pt" officeooo:paragraph-rsid="002ac9c5" style:font-size-asian="12pt" style:font-size-complex="12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Heading_20_3">
      <style:text-properties style:font-name="Liberation Serif" fo:font-size="12pt" officeooo:rsid="002d97e1" officeooo:paragraph-rsid="002d97e1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2d97e1" style:font-size-asian="12pt" style:font-size-complex="12pt"/>
    </style:style>
    <style:style style:name="P13" style:family="paragraph" style:parent-style-name="Heading_20_3">
      <style:text-properties style:font-name="Liberation Serif" fo:font-size="12pt" officeooo:rsid="002d97e1" style:font-size-asian="12pt" style:font-size-complex="12pt"/>
    </style:style>
    <style:style style:name="P14" style:family="paragraph" style:parent-style-name="Text_20_body">
      <style:text-properties officeooo:rsid="002d97e1"/>
    </style:style>
    <style:style style:name="T1" style:family="text">
      <style:text-properties officeooo:rsid="002d0ee0"/>
    </style:style>
    <style:style style:name="T2" style:family="text">
      <style:text-properties fo:color="#000000" loext:opacity="100%" style:font-name="Liberation Serif" fo:font-weight="normal" style:font-size-asian="12pt" style:font-weight-asian="normal" style:font-weight-complex="normal"/>
    </style:style>
    <style:style style:name="T3" style:family="text">
      <style:text-properties officeooo:rsid="002d97e1"/>
    </style:style>
    <style:style style:name="T4" style:family="text">
      <style:text-properties officeooo:rsid="002e851a"/>
    </style:style>
    <style:style style:name="T5" style:family="text">
      <style:text-properties officeooo:rsid="00358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gerprints_absorpcja</text:p>
      <text:p text:style-name="P1"/>
      <text:h text:style-name="P2" text:outline-level="3">Caco-2 (Wang)</text:h>
      <text:p text:style-name="P3">Caco-2 jest modelem laboratoryjnym służącym do oceny zdolności związku do wchłaniania w jelicie.</text:p>
      <text:p text:style-name="P3">Model ten wykorzystuje komórki, które naśladują barierę jelita cienkiego.</text:p>
      <text:p text:style-name="P4">Aby lek podany doustnie dostał się do krwiobiegu, musi najpierw przeniknąć przez ścianę jelita.</text:p>
      <text:h text:style-name="P5" text:outline-level="3">Lipophilicity (AstraZeneca)</text:h>
      <text:p text:style-name="P6">Lipofilowość opisuje zdolność cząsteczki do rozpuszczania się w środowisku tłuszczowym.</text:p>
      <text:p text:style-name="P6">Ponieważ błony komórek mają charakter lipidowy, związki o odpowiedniej lipofilowości łatwiej przez nie przechodzą, co może sprzyjać wchłanianiu leku.</text:p>
      <text:p text:style-name="P6">Należy jednak zaznaczyć, że zbyt wysoka lipofilowość nie zawsze jest korzystna. Może powodować zatrzymywanie cząsteczki w błonie komórkowej.</text:p>
      <text:p text:style-name="P6">Dlatego najlepsze właściwości mają zwykle związki o zrównoważonej lipofilowości.</text:p>
      <text:h text:style-name="P5" text:outline-level="3">Solubility (AqSolDB)</text:h>
      <text:p text:style-name="P6">Solubility oznacza rozpuszczalność wodną, czyli zdolność cząsteczki do rozpuszczania się w wodzie.</text:p>
      <text:p text:style-name="P6">Jest to bardzo ważna cecha leków doustnych, ponieważ substancja musi najpierw rozpuścić się w płynach przewodu pokarmowego, zanim będzie mogła zostać wchłonięta.</text:p>
      <text:p text:style-name="P6">Niska rozpuszczalność może prowadzić do wolniejszego działania leku, słabszego wchłaniania oraz niższej biodostępności.</text:p>
      <text:p text:style-name="P6">Im lepsza rozpuszczalność wodna, tym większa wchł<text:span text:style-name="T1">anialność </text:span>leku.</text:p>
      <text:h text:style-name="P5" text:outline-level="3">HIA (Hou)</text:h>
      <text:p text:style-name="P6">HIA (Human Intestinal Absorption) oznacza wchłanianie jelitowe u człowieka.</text:p>
      <text:p text:style-name="Text_20_body"><text:span text:style-name="T2">Endpoint ten określa, czy związek podany doustnie zostanie wchłonięty z przewodu pokarmowego do krwiobiegu. </text:span>W przeciwieństwie do modelu Caco-2, który jest testem laboratoryjnym, HIA odnosi się bezpośrednio do organizmu człowieka.</text:p>
      <text:h text:style-name="P5" text:outline-level="3">AMES Mutagenicity</text:h>
      <text:p text:style-name="P6">AMES Mutagenicity opisuje potencjał mutagenny związku, czyli zdolność do wywoływania zmian w materiale genetycznym komórek.</text:p>
      <text:p text:style-name="P7"/>
      <text:p text:style-name="P8"/>
      <text:h text:style-name="P9" text:outline-level="3"><text:soft-page-break/>1. Caco-2 (Wang) + Lipophilicity (AstraZeneca)</text:h>
      <text:p text:style-name="P10">Połączono endpoint wchłaniania jelitowego z lipofilowością, ponieważ zdolność przenikania przez błony komórkowe silnie zależy od lipofilowości cząsteczki. Test sprawdza, czy powiązane zadanie poprawi wyniki Caco-2 oraz czy MTL będzie lepsze od STL.</text:p>
      <text:h text:style-name="P11" text:outline-level="3">2. Caco-2 (Wang) + Lipophilicity (AstraZeneca) + Solubility (AqSolDB)</text:h>
      <text:p text:style-name="P12">Do poprzedniego zestawu dodano rozpuszczalność wodną, ponieważ lek musi najpierw się rozpuścić, aby mógł zostać wchłonięty. Test sprawdza, czy dodanie kolejnego powiązanego endpointu poprawi predykcję.</text:p>
      <text:h text:style-name="P13" text:outline-level="3">3. Caco-2 (Wang) + Lipophilicity (AstraZeneca) + Solubility (AqSolDB) + HIA (Hou)</text:h>
      <text:p text:style-name="P10"><text:span text:style-name="T3">Do zestawu dodano HIA, ponieważ jest to końcowy wskaźnik skuteczności wchłaniania leku u człowieka. </text:span>Pozostałe endpointy opisują czynniki wpływające na ten proces. Test sprawdza, czy połączenie kilku powiązanych zadań daje dalszą poprawę wyników modelu.</text:p>
      <text:h text:style-name="P13" text:outline-level="3"><text:span text:style-name="T4">4. </text:span>Caco-2 (Wang) + HIA (Hou)</text:h>
      <text:p text:style-name="P12">Połączono dwa endpointy dotyczące tego samego procesu, czyli wchłaniania jelitowego. Caco-2 opisuje model laboratoryjny, natomiast HIA rzeczywiste wchłanianie u człowieka. Test ma sprawdzić, czy biologicznie bardzo zbliżone zadanie może skutecznie wspierać predykcję Caco-2 mimo mniejszej liczby danych.</text:p>
      <text:h text:style-name="P13" text:outline-level="3">5. Lipophilicity (AstraZeneca) + Solubility (AqSolDB)</text:h>
      <text:p text:style-name="P12">Połączono dwa duże zbiory opisujące podstawowe właściwości cząsteczki. Lipofilowość i rozpuszczalność wspólnie wpływają na zachowanie związku w organizmie <text:span text:style-name="T5">oraz są zależne (wysoka lipofilowość prowadzi do słabej rozpuszczalności wodnej)</text:span>. Test sprawdza, czy model MTL potrafi wykorzystać zależności między tymi cechami.</text:p>
      <text:h text:style-name="P13" text:outline-level="3">6. Caco-2 (Wang) + AMES Mutagenicity</text:h>
      <text:p text:style-name="P12">Połączono endpoint wchłaniania z endpointem toksyczności, które opisują różne aspekty działania cząsteczki. Test ma sprawdzić, czy nawet słabiej powiązane zadanie może dostarczyć użytecznej informacji, czy raczej pogorszy skuteczność modelu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0:50:06.977659162</meta:creation-date>
    <dc:date>2026-04-14T13:32:25.429091710</dc:date>
    <meta:editing-duration>PT2M20S</meta:editing-duration>
    <meta:editing-cycles>1</meta:editing-cycles>
    <meta:document-statistic meta:table-count="0" meta:image-count="0" meta:object-count="0" meta:page-count="2" meta:paragraph-count="32" meta:word-count="453" meta:character-count="3572" meta:non-whitespace-character-count="3151"/>
    <meta:generator>LibreOffice/25.8.5.2$Linux_X86_64 LibreOffice_project/580$Build-2</meta:generator>
  </office:meta>
</office:document-meta>
</file>