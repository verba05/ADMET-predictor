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f5ea" officeooo:paragraph-rsid="000ff5ea" style:font-weight-asian="bold" style:font-weight-complex="bold"/>
    </style:style>
    <style:style style:name="P2" style:family="paragraph" style:parent-style-name="Standard">
      <style:text-properties fo:font-weight="normal" officeooo:rsid="000ff5ea" officeooo:paragraph-rsid="000ff5ea" style:font-weight-asian="normal" style:font-weight-complex="normal"/>
    </style:style>
    <style:style style:name="P3" style:family="paragraph" style:parent-style-name="Standard">
      <style:text-properties fo:font-weight="bold" officeooo:rsid="00109459" officeooo:paragraph-rsid="00109459" style:font-weight-asian="bold" style:font-weight-complex="bold"/>
    </style:style>
    <style:style style:name="P4" style:family="paragraph" style:parent-style-name="Standard">
      <style:text-properties fo:font-weight="normal" officeooo:rsid="00109459" officeooo:paragraph-rsid="00109459" style:font-weight-asian="normal" style:font-weight-complex="normal"/>
    </style:style>
    <style:style style:name="P5" style:family="paragraph" style:parent-style-name="Heading_20_3">
      <style:text-properties fo:font-variant="normal" fo:text-transform="none" fo:color="#000000" loext:opacity="100%" style:font-name="Liberation Serif" fo:font-size="12pt" fo:letter-spacing="normal" fo:font-style="normal" fo:font-weight="bold" officeooo:rsid="00109459" officeooo:paragraph-rsid="00109459" style:font-size-asian="12pt" style:font-weight-asian="bold" style:font-size-complex="12pt" style:font-weight-complex="bold"/>
    </style:style>
    <style:style style:name="P6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138aaa" officeooo:paragraph-rsid="00138aaa" style:font-size-asian="12pt" style:font-weight-asian="normal" style:font-size-complex="12pt" style:font-weight-complex="normal"/>
    </style:style>
    <style:style style:name="P7" style:family="paragraph" style:parent-style-name="Text_20_body">
      <style:text-properties officeooo:paragraph-rsid="0016960c"/>
    </style:style>
    <style:style style:name="P8" style:family="paragraph" style:parent-style-name="Standard">
      <style:text-properties fo:color="#000000" loext:opacity="100%" fo:font-weight="normal" officeooo:rsid="00109459" officeooo:paragraph-rsid="00109459" style:font-weight-asian="normal" style:font-weight-complex="normal"/>
    </style:style>
    <style:style style:name="P9" style:family="paragraph" style:parent-style-name="Standard">
      <style:text-properties fo:font-weight="bold" officeooo:rsid="001132fe" officeooo:paragraph-rsid="001132fe" style:font-weight-asian="bold" style:font-weight-complex="bold"/>
    </style:style>
    <style:style style:name="P10" style:family="paragraph" style:parent-style-name="Standard">
      <style:text-properties fo:font-weight="normal" officeooo:rsid="001132fe" officeooo:paragraph-rsid="001132fe" style:font-weight-asian="normal" style:font-weight-complex="normal"/>
    </style:style>
    <style:style style:name="P11" style:family="paragraph" style:parent-style-name="Standard">
      <style:text-properties fo:font-weight="normal" officeooo:rsid="0014c652" officeooo:paragraph-rsid="0014c652" style:font-weight-asian="normal" style:font-weight-complex="normal"/>
    </style:style>
    <style:style style:name="P12" style:family="paragraph" style:parent-style-name="Standard">
      <style:text-properties fo:font-weight="normal" officeooo:rsid="00109459" officeooo:paragraph-rsid="0014c652" style:font-weight-asian="normal" style:font-weight-complex="normal"/>
    </style:style>
    <style:style style:name="P13" style:family="paragraph" style:parent-style-name="Standard">
      <style:text-properties fo:font-weight="bold" officeooo:rsid="00150de2" officeooo:paragraph-rsid="00150de2" style:font-weight-asian="bold" style:font-weight-complex="bold"/>
    </style:style>
    <style:style style:name="P14" style:family="paragraph" style:parent-style-name="Heading_20_3">
      <style:text-properties fo:font-size="12pt" fo:font-weight="bold" officeooo:rsid="00150de2" officeooo:paragraph-rsid="00150de2" style:font-size-asian="12pt" style:font-weight-asian="bold" style:font-size-complex="12pt" style:font-weight-complex="bold"/>
    </style:style>
    <style:style style:name="P15" style:family="paragraph" style:parent-style-name="Text_20_body">
      <style:text-properties fo:font-size="12pt" officeooo:rsid="00150de2" style:font-size-asian="12pt" style:font-size-complex="12pt"/>
    </style:style>
    <style:style style:name="P16" style:family="paragraph" style:parent-style-name="Standard">
      <style:text-properties fo:font-weight="normal" officeooo:rsid="00150de2" officeooo:paragraph-rsid="00150de2" style:font-weight-asian="normal" style:font-weight-complex="normal"/>
    </style:style>
    <style:style style:name="P17" style:family="paragraph" style:parent-style-name="Standard">
      <style:text-properties fo:font-weight="bold" officeooo:paragraph-rsid="001950de" style:font-weight-asian="bold" style:font-weight-complex="bold"/>
    </style:style>
    <style:style style:name="P18" style:family="paragraph" style:parent-style-name="Standard">
      <style:text-properties officeooo:paragraph-rsid="001950de"/>
    </style:style>
    <style:style style:name="P19" style:family="paragraph" style:parent-style-name="Standard">
      <style:text-properties officeooo:paragraph-rsid="0019f393"/>
    </style:style>
    <style:style style:name="P20" style:family="paragraph" style:parent-style-name="Standard">
      <style:text-properties officeooo:rsid="0019f393" officeooo:paragraph-rsid="0019f393"/>
    </style:style>
    <style:style style:name="P21" style:family="paragraph" style:parent-style-name="Standard">
      <style:text-properties fo:font-weight="bold" officeooo:rsid="00109459" officeooo:paragraph-rsid="0014c652" style:font-weight-asian="bold" style:font-weight-complex="bold"/>
    </style:style>
    <style:style style:name="T1" style:family="text">
      <style:text-properties officeooo:rsid="00109459"/>
    </style:style>
    <style:style style:name="T2" style:family="text">
      <style:text-properties officeooo:rsid="001396c9"/>
    </style:style>
    <style:style style:name="T3" style:family="text">
      <style:text-properties officeooo:rsid="001499e5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ff5ea" style:font-weight-asian="bold" style:font-weight-complex="bold"/>
    </style:style>
    <style:style style:name="T7" style:family="text">
      <style:text-properties fo:font-weight="bold" officeooo:rsid="00109459" style:font-weight-asian="bold" style:font-weight-complex="bold"/>
    </style:style>
    <style:style style:name="T8" style:family="text">
      <style:text-properties officeooo:rsid="0017898d"/>
    </style:style>
    <style:style style:name="T9" style:family="text">
      <style:text-properties officeooo:rsid="001950de"/>
    </style:style>
    <style:style style:name="T10" style:family="text">
      <style:text-properties fo:font-weight="bold" officeooo:rsid="0019f393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lf Life (Obach)</text:p>
      <text:p text:style-name="P2"><text:span text:style-name="T1">Half life</text:span> to czas potrzebny do zmniejszenia stężenia leku w organizmie o połowę. Jest to miara czasu działania leku.</text:p>
      <text:p text:style-name="P2"/>
      <text:p text:style-name="P3">Clearance Hepatocyte</text:p>
      <text:p text:style-name="P4">Klirens leku definiuje się jako objętość osocza oczyszczoną z leku w określonym przedziale czasu i stanowi on miarę szybkości, z jaką aktywna substancja jest usuwana z organizmu.</text:p>
      <text:p text:style-name="P4"/>
      <text:h text:style-name="P5" text:outline-level="3"><text:bookmark text:name="cyp-p450-3a4-inhibition-veith-et-al"/>CYP P450 3A4 Inhibition</text:h>
      <text:p text:style-name="P6">Geny CYP P450 są kluczowe dla rozkładu (metabolizmu) różnych cząsteczek i substancji chemicznych w komórkach. Lek, który może hamować <text:span text:style-name="T2">(inhibicja) </text:span>działanie tych enzymów, powoduje słabszy metabolizm zarówno tego leku, jak i innych leków metabolizowanych tym samym <text:span text:style-name="T3">enzymem</text:span>. </text:p>
      <text:p text:style-name="P7"><text:span text:style-name="T4">CYP3A4 jest ważnym enzymem w organizmie, występującym głównie w wątrobie oraz jelitach. </text:span>Jest odpowiedzialny za metabolizm około 50% leków stosowanych klinicznie.<text:span text:style-name="T4"> Odpowiada za utlenianie niewielkich obcych cząsteczek organicznych, takich jak toksyny czy leki, dzięki czemu mogą one zostać usunięte z organizmu.</text:span></text:p>
      <text:p text:style-name="P8"/>
      <text:p text:style-name="P9">Vdss</text:p>
      <text:p text:style-name="P10">VDss mierzy stopień rozmieszczenia leku w tkankach organizmu w porównaniu ze stężeniem leku we krwi. Wyższa wartość VDss wskazuje na większą dystrybucję do tkanek oraz zwykle dotyczy leków o wysokiej lipofilowości oraz niskim stopniu wiązania z białkami osocza.</text:p>
      <text:p text:style-name="P10"/>
      <text:p text:style-name="P11"><text:span text:style-name="T5">Test 1. </text:span><text:span text:style-name="T6">Half Life (Obach) </text:span><text:span text:style-name="T5">+ </text:span><text:span text:style-name="T7">Clearance Hepatocyte</text:span></text:p>
      <text:p text:style-name="P12">Połączono dwa endpointy bezpośrednio związane z usuwaniem leku z organizmu. Klirens określa szybkość eliminacji substancji, natomiast okres półtrwania opisuje, jak długo lek utrzymuje się w organizmie. Parametry te są silnie powiązane, dlatego test sprawdza, czy wspólne uczenie poprawi predykcję czasu działania leku.</text:p>
      <text:p text:style-name="P13"/>
      <text:h text:style-name="P14" text:outline-level="3"><text:span text:style-name="T8">Test 2. </text:span>Half Life (Obach) + Clearance Hepatocyte + CYP P450 3A4 Inhibition</text:h>
      <text:p text:style-name="P15">Do zestawu dodano inhibicję CYP3A4, ponieważ enzym ten odgrywa kluczową rolę w metabolizmie wielu leków. Hamowanie CYP3A4 może spowalniać rozkład substancji, wpływając zarówno na klirens, jak i okres półtrwania. Test sprawdza, czy dodanie endpointu metabolicznego poprawi predykcję pozostałych parametrów.</text:p>
      <text:p text:style-name="P16"/>
      <text:p text:style-name="P17"><text:span text:style-name="T9">Test 3. </text:span>Half Life (Obach) + Clearance Hepatocyte + CYP P450 3A4 Inhibition + Vdss</text:p>
      <text:p text:style-name="P17"/>
      <text:p text:style-name="P18">Dodano VDss, który opisuje rozmieszczenie leku w tkankach organizmu. Parametr ten wpływa na stężenie leku we krwi, a pośrednio również na czas działania i eliminację. Test ma sprawdzić, czy uwzględnienie jednocześnie metabolizmu, eliminacji i dystrybucji pozwoli uzyskać najlepsze wyniki modelu.</text:p>
      <text:p text:style-name="P18"/>
      <text:p text:style-name="P19"><text:span text:style-name="T10">Test 4. </text:span><text:span text:style-name="T5">Half Life (Obach) + VDs</text:span>s</text:p>
      <text:p text:style-name="P20"><text:soft-page-break/>Połączono okres półtrwania z objętością dystrybucji, ponieważ leki silniej gromadzące się w tkankach często dłużej utrzymują się w organizmie. Test sprawdza, czy endpoint związany z dystrybucją może wspierać predykcję czasu działania leku mimo braku danych bezpośrednio metabolicznych.</text:p>
      <text:p text:style-name="P21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5T10:17:18.451688649</meta:creation-date>
    <dc:date>2026-04-15T11:23:04.877631606</dc:date>
    <meta:editing-duration>PT18M12S</meta:editing-duration>
    <meta:editing-cycles>1</meta:editing-cycles>
    <meta:document-statistic meta:table-count="0" meta:image-count="0" meta:object-count="0" meta:page-count="2" meta:paragraph-count="17" meta:word-count="373" meta:character-count="2638" meta:non-whitespace-character-count="2281"/>
    <meta:generator>LibreOffice/25.8.5.2$Linux_X86_64 LibreOffice_project/580$Build-2</meta:generator>
  </office:meta>
</office:document-meta>
</file>